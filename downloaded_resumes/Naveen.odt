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19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RICULUM VITAE</text:p>
      <text:p text:style-name="Standard">NAME: NAVEEN BABU MADIPALLI</text:p>
      <text:p text:style-name="P1">(+91) 7670818862 (India) PHONE: (+48)579294860(Poland)</text:p>
      <text:p text:style-name="Standard">MAIL: naveen.babu220@gmail.com</text:p>
      <text:p text:style-name="Standard">TECHNICAL SKILLS:</text:p>
      <text:p text:style-name="Standard"> Programming Languages: C, Java, Python, Dart</text:p>
      <text:p text:style-name="Standard"> Frameworks: Django, Flask, FastAPI, Flutter</text:p>
      <text:p text:style-name="Standard"> Web Technologies: HTML, CSS, JS</text:p>
      <text:p text:style-name="Standard"> Python Libraries: NumPy, Matplotlib, Panda</text:p>
      <text:p text:style-name="Standard"> Algorithms: Linear Regression, Logistic Regression, Decision</text:p>
      <text:p text:style-name="Standard">Tee, SVM, Naive Bayes, KNN, K-Means</text:p>
      <text:p text:style-name="Standard"> Tools and software: GIT, Docker, PyCharm, Sublime Text, Microsoft</text:p>
      <text:p text:style-name="Standard">Visual Studio, ∙ Databases: MySQL, DBSQL Lite, PostgreSQL</text:p>
      <text:p text:style-name="Standard"> Operating Systems: Windows, Linux</text:p>
      <text:p text:style-name="Standard">PROFILE:</text:p>
      <text:p text:style-name="Standard"> 7+ years of experience in analysis design, development and implementation of</text:p>
      <text:p text:style-name="Standard">various e-commerce apps, Internet web apps, databases and Client-server</text:p>
      <text:p text:style-name="Standard">architecture using Python/Django, HTML, CSS, JavaScript technologies</text:p>
      <text:p text:style-name="Standard">spanning the entire Software Development Life Cycle</text:p>
      <text:p text:style-name="Standard"> Experience in writing map-reduce programs in Python</text:p>
      <text:p text:style-name="Standard"> Good knowledge in developing dimensions and cubes for data warehouse using</text:p>
      <text:p text:style-name="Standard">SQL Server Analysis Service (SSAS)</text:p>
      <text:p text:style-name="Standard"> Created SQL server Integration Services (SSIS) packages for ETL process •</text:p>
      <text:p text:style-name="Standard">Experience in writing, optimizing and debugging stored procedures, functions,</text:p>
      <text:p text:style-name="Standard">views, triggers and troubleshooting database issues</text:p>
      <text:p text:style-name="Standard"> Experience on Unix/Linux command using SSH Expert in developing Object-</text:p>
      <text:p text:style-name="Standard">Oriented Web apps using MVC architecture</text:p>
      <text:p text:style-name="Standard"> Strong background in a disciplined software development life cycle (SDLC)</text:p>
      <text:p text:style-name="Standard">process and excellent analytical, programming and problem-solving skills</text:p>
      <text:p text:style-name="Standard"> Experience with GIT</text:p>
      <text:p text:style-name="Standard"> Experience working an Agile/Scrum workflow</text:p>
      <text:p text:style-name="Standard">EXPERIENCE:</text:p>
      <text:p text:style-name="Standard">08-2022 – Till date: Python Developer | Collabera Poland</text:p>
      <text:p text:style-name="Standard">Sp. z o.o :</text:p>
      <text:p text:style-name="Standard">Client: Cisco:</text:p>
      <text:p text:style-name="Standard"> Worked as a Python developer in Cisco to update the PSIRT signatures to</text:p>
      <text:p text:style-name="Standard">check if the devices are vulnerable or not.</text:p>
      <text:p text:style-name="Standard"> Developed and optimized AWS Lambda functions to optimize</text:p>
      <text:p text:style-name="Standard">S3 buckets. Implemented serverless computing architecture</text:p>
      <text:p text:style-name="Standard">using AWS Lambda, used python to write the code to automate</text:p>
      <text:p text:style-name="Standard">data in the cloud,</text:p>
      <text:p text:style-name="Standard"> Resolved and updated previous code as per current standards</text:p>
      <text:p text:style-name="Standard"> Created API’s using Fast API for streamlining data access and improving</text:p>
      <text:p text:style-name="Standard">response times for end-users.</text:p>
      <text:p text:style-name="Standard"> Designed and implemented AWS pipeline to streamline data</text:p>
      <text:p text:style-name="Standard">processing and enhance efficiency in the project.</text:p>
      <text:p text:style-name="Standard">04-2019 – 07-2022: Full-Stack Developer | Forschers Enterprises:</text:p>
      <text:p text:style-name="Standard"> Worked with tables from MySQL, PostgreSQL, database with</text:p>
      <text:p text:style-name="Standard">Python</text:p>
      <text:p text:style-name="Standard"><text:soft-page-break/> Performed cleansing operation on data generated from web</text:p>
      <text:p text:style-name="Standard">logs with automated scripts in Python</text:p>
      <text:p text:style-name="Standard"> Used Python to build a General-Purpose Test Framework</text:p>
      <text:p text:style-name="Standard"> Used Subversion control tools to coordinate team development</text:p>
      <text:p text:style-name="Standard"> Parsed XML docs using Python scripts and load into the</text:p>
      <text:p text:style-name="Standard">database ∙ Created Django forms for database models</text:p>
      <text:p text:style-name="Standard"> Worked on front-end using HTML5 and CSS3</text:p>
      <text:p text:style-name="Standard"> Daily MySQL database maintenance</text:p>
      <text:p text:style-name="Standard"> Worked on back-end and front-end feature</text:p>
      <text:p text:style-name="Standard"> Respond and resolve emergency issues on the back-end and/or</text:p>
      <text:p text:style-name="Standard">front-end in a timely manner</text:p>
      <text:p text:style-name="Standard">08.2013– 05.2016: Web developer| Maarusa Technologies PVT LTD :</text:p>
      <text:p text:style-name="Standard"> Django, MySQL for creating dynamic data driven and interactive web pages •</text:p>
      <text:p text:style-name="Standard">Worked with the team of architect and back-end developers to gather</text:p>
      <text:p text:style-name="Standard">requirements and enhance the functionality and new features</text:p>
      <text:p text:style-name="Standard"> Helped in designing, coding, modifying website, from layout to function</text:p>
      <text:p text:style-name="Standard">using CSS • Documenting and maintaining current software systems</text:p>
      <text:p text:style-name="Standard"> Considerably used JavaScript for client-side presentation and data</text:p>
      <text:p text:style-name="Standard">validation on the client side</text:p>
      <text:p text:style-name="Standard"> Aides the application developers in their progress to development</text:p>
      <text:p text:style-name="Standard">activities to accomplish ideal proficiency</text:p>
      <text:p text:style-name="Standard"> Involved in physical/logical plan of database, creating and dealing with the</text:p>
      <text:p text:style-name="Standard">database and all the database objects</text:p>
      <text:p text:style-name="Standard"> Extensive used data extraction, transforming and loading (ETL) using</text:p>
      <text:p text:style-name="Standard">various tools as SQL Server Integration Services (SSIS) and Informatica</text:p>
      <text:p text:style-name="Standard">Technical Projects:</text:p>
      <text:p text:style-name="Standard"> Designed and implemented a real-time CCTV face recognition platform using RTSP</text:p>
      <text:p text:style-name="Standard">streaming and DeepFace embeddings (Facenet512).</text:p>
      <text:p text:style-name="Standard"> Built a robust pipeline with auto-reconnect logic, frame buffering, and defensive error</text:p>
      <text:p text:style-name="Standard">handling for continuous video capture.</text:p>
      <text:p text:style-name="Standard"> Achieved accurate recognition by integrating RetinaFace detection and embedding-based</text:p>
      <text:p text:style-name="Standard">cosine similarity matching.</text:p>
      <text:p text:style-name="Standard"> Packaged the system into a deployable executable with PyInstaller, handling hidden imports</text:p>
      <text:p text:style-name="Standard">and resource paths.</text:p>
      <text:p text:style-name="Standard"> Added audio feedback (gTTS) and logging to CSV for user interaction and event tracking.</text:p>
      <text:p text:style-name="Standard"> Optimized performance with frame resizing, threshold tuning, and modular backend</text:p>
      <text:p text:style-name="Standard">architecture.</text:p>
      <text:p text:style-name="Standard">Link : https://gitlab.com/naveen.babu220-group/naveen.babu220-project</text:p>
      <text:p text:style-name="Standard">EDUCATION:</text:p>
      <text:p text:style-name="Standard">2009 – 2013: JNTUH, BA Electronics &amp; Communication Engineering</text:p>
      <text:p text:style-name="Standard">LANGUAGES:</text:p>
      <text:p text:style-name="Standard">• English (C1 Level – Advanced)</text:p>
      <text:p text:style-name="Standard">• Polish (A1 Level)</text:p>
      <text:p text:style-name="Standard">• Telugu (Nativ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7-10T17:44:32.498347188</meta:creation-date>
    <dc:date>2026-07-10T17:45:07.780090889</dc:date>
    <meta:editing-duration>PT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93" meta:word-count="669" meta:character-count="4623" meta:non-whitespace-character-count="4043"/>
  </office:meta>
</office:document-meta>
</file>